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448000002A85A042262936B0456.png" manifest:media-type="image/png"/>
  <manifest:file-entry manifest:full-path="Pictures/1000000100000448000002A8CB036F119B136A3E.png" manifest:media-type="image/png"/>
  <manifest:file-entry manifest:full-path="Pictures/1000000100000448000002A823D47E6650237F9D.png" manifest:media-type="image/png"/>
  <manifest:file-entry manifest:full-path="Pictures/1000000100000448000002A8951EF781A199CE9E.png" manifest:media-type="image/png"/>
  <manifest:file-entry manifest:full-path="Pictures/1000000100000448000002A8904D9C302B76E4A9.png" manifest:media-type="image/png"/>
  <manifest:file-entry manifest:full-path="Pictures/1000000100000448000002A8DD9FC184786917AE.png" manifest:media-type="image/png"/>
  <manifest:file-entry manifest:full-path="Pictures/10000001000000BB0000002129DF9175F90312E7.png" manifest:media-type="image/png"/>
  <manifest:file-entry manifest:full-path="Pictures/10000001000002370000017AAD1BBE2C9AD93B0F.png" manifest:media-type="image/png"/>
  <manifest:file-entry manifest:full-path="Pictures/1000000100000448000002A87B4B4920FE716020.png" manifest:media-type="image/png"/>
  <manifest:file-entry manifest:full-path="Pictures/100000010000093B000001EC2238E9E7DF663747.png" manifest:media-type="image/png"/>
  <manifest:file-entry manifest:full-path="Pictures/100000000000020B00000185707DFC3064A4ADEB.png" manifest:media-type="image/png"/>
  <manifest:file-entry manifest:full-path="Pictures/1000000100000448000002A8E3B9DAD006F76A1E.png" manifest:media-type="image/png"/>
  <manifest:file-entry manifest:full-path="Pictures/1000000100000211000000E305D7A7D960EFFB8A.png" manifest:media-type="image/png"/>
  <manifest:file-entry manifest:full-path="Pictures/1000000100000448000002A8C9FB2B920DE3B710.png" manifest:media-type="image/png"/>
  <manifest:file-entry manifest:full-path="Pictures/10000001000002370000017A668C8911D5419252.png" manifest:media-type="image/png"/>
  <manifest:file-entry manifest:full-path="Pictures/100000010000017A0000017A21D4FB42E62E09FF.png" manifest:media-type="image/png"/>
  <manifest:file-entry manifest:full-path="Pictures/1000000100000266000001CD735FE35BEF552BF2.png" manifest:media-type="image/png"/>
  <manifest:file-entry manifest:full-path="Pictures/1000000100000448000002A87D22A8E7EB073AEE.png" manifest:media-type="image/png"/>
  <manifest:file-entry manifest:full-path="Pictures/1000000100000448000002A8DC76DC28740B71CC.png" manifest:media-type="image/png"/>
  <manifest:file-entry manifest:full-path="settings.xml" manifest:media-type="text/xml"/>
  <manifest:file-entry manifest:full-path="Thumbnails/thumbnail.png" manifest:media-type="image/png"/>
  <manifest:file-entry manifest:full-path="ObjectReplacements/Object 2" manifest:media-type=""/>
  <manifest:file-entry manifest:full-path="ObjectReplacements/Object 1" manifest:media-type=""/>
  <manifest:file-entry manifest:full-path="Media/random8-6x.mp4" manifest:media-type="application/vnd.sun.star.media"/>
  <manifest:file-entry manifest:full-path="Media/maze10.mp4" manifest:media-type="application/vnd.sun.star.media"/>
  <manifest:file-entry manifest:full-path="Media/circle3.mp4" manifest:media-type="application/vnd.sun.star.media"/>
  <manifest:file-entry manifest:full-path="Media/random8sphere-6.mp4" manifest:media-type="application/vnd.sun.star.media"/>
  <manifest:file-entry manifest:full-path="Media/mrmp-example.mp4" manifest:media-type="application/vnd.sun.star.media"/>
  <manifest:file-entry manifest:full-path="Media/atgoal3.mp4" manifest:media-type="application/vnd.sun.star.media"/>
  <manifest:file-entry manifest:full-path="Media/n50-10x.mp4" manifest:media-type="application/vnd.sun.star.media"/>
  <manifest:file-entry manifest:full-path="Media/dblacam.mp4" manifest:media-type="application/vnd.sun.star.media"/>
  <manifest:file-entry manifest:full-path="Media/mapf-example.mp4" manifest:media-type="application/vnd.sun.star.medi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5.34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0.498cm" fo:min-width="5.427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21.24cm" fo:padding-top="0.125cm" fo:padding-bottom="0.125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1.53cm" fo:padding-top="0.125cm" fo:padding-bottom="0.125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28cm" fo:min-width="2.697cm" fo:padding-top="0.125cm" fo:padding-bottom="0.125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28cm" fo:min-width="4.359cm" fo:padding-top="0.125cm" fo:padding-bottom="0.125cm" fo:padding-left="0.25cm" fo:padding-right="0.25cm" fo:wrap-option="no-wrap" draw:shadow-color="#808080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09cm" fo:min-width="8.698cm" fo:padding-top="0.125cm" fo:padding-bottom="0.125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4cm" fo:min-width="0.687cm" fo:padding-top="0.125cm" fo:padding-bottom="0.125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333cm" fo:min-width="21.717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6.696cm" fo:padding-top="0.125cm" fo:padding-bottom="0.125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08cm" fo:min-width="7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08cm" fo:min-width="6.008cm" fo:padding-top="0.125cm" fo:padding-bottom="0.125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3cm" fo:min-width="20.614cm" fo:padding-top="0.125cm" fo:padding-bottom="0.125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9.327cm" fo:min-width="21.725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6.697cm" fo:padding-top="0.125cm" fo:padding-bottom="0.125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69cm" fo:min-width="9.66cm" fo:padding-top="0.125cm" fo:padding-bottom="0.125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08cm" fo:min-width="9.285cm" fo:padding-top="0.125cm" fo:padding-bottom="0.125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2cm" fo:min-width="13.96cm" fo:padding-top="0.125cm" fo:padding-bottom="0.125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69cm" fo:min-width="9.66cm" fo:padding-top="0.125cm" fo:padding-bottom="0.125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08cm" fo:min-width="9.285cm" fo:padding-top="0.125cm" fo:padding-bottom="0.125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2cm" fo:min-width="13.96cm" fo:padding-top="0.125cm" fo:padding-bottom="0.125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solid" svg:stroke-width="0.026cm" svg:stroke-color="#158466" svg:stroke-opacity="100%" draw:stroke-linejoin="round" draw:fill="none" draw:fill-color="#ffffff" draw:textarea-horizontal-align="left" draw:textarea-vertical-align="middle" draw:auto-grow-height="false" fo:min-height="1.037cm" fo:min-width="2.27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middle" draw:auto-grow-height="false" fo:min-height="0.322cm" fo:min-width="5.7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96cm" fo:min-width="19.705cm" fo:padding-top="0.125cm" fo:padding-bottom="0.125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4.727cm" fo:padding-top="0.125cm" fo:padding-bottom="0.125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67cm" fo:min-width="8.293cm" fo:padding-top="0.125cm" fo:padding-bottom="0.125cm" fo:padding-left="0.25cm" fo:padding-right="0.25cm" fo:wrap-option="no-wrap" draw:shadow-color="#808080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28cm" fo:min-width="8.046cm" fo:padding-top="0.125cm" fo:padding-bottom="0.125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28cm" fo:min-width="5.396cm" fo:padding-top="0.125cm" fo:padding-bottom="0.125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28cm" fo:min-width="8.373cm" fo:padding-top="0.125cm" fo:padding-bottom="0.125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099cm" fo:padding-top="0.125cm" fo:padding-bottom="0.125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3.521cm" fo:padding-top="0.125cm" fo:padding-bottom="0.125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99cm" fo:min-width="14.392cm" fo:padding-top="0.125cm" fo:padding-bottom="0.125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24cm" fo:min-width="22.969cm" fo:padding-top="0.125cm" fo:padding-bottom="0.125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9.18cm" fo:padding-top="0.125cm" fo:padding-bottom="0.125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2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3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0.198cm" fo:padding-top="0.125cm" fo:padding-bottom="0.125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2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3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165cm" fo:padding-top="0.125cm" fo:padding-bottom="0.125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2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3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5.005cm" fo:padding-top="0.125cm" fo:padding-bottom="0.125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2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3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3.153cm" fo:padding-top="0.125cm" fo:padding-bottom="0.125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2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53cm" fo:min-width="2.018cm" fo:padding-top="0.125cm" fo:padding-bottom="0.125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4.18cm" fo:padding-top="0.125cm" fo:padding-bottom="0.125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4.268cm" fo:padding-top="0.125cm" fo:padding-bottom="0.125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99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21.646cm" fo:padding-top="0.125cm" fo:padding-bottom="0.125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99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5.481cm" fo:padding-top="0.125cm" fo:padding-bottom="0.125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99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5.322cm" fo:padding-top="0.125cm" fo:padding-bottom="0.125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99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839cm" fo:padding-top="0.125cm" fo:padding-bottom="0.125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1.071cm" fo:padding-top="0.125cm" fo:padding-bottom="0.125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99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99cm" fo:min-width="2.653cm" fo:padding-top="0.125cm" fo:padding-bottom="0.125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4.743cm" fo:padding-top="0.125cm" fo:padding-bottom="0.125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6cm" fo:min-width="16.826cm" fo:padding-top="0.125cm" fo:padding-bottom="0.125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6cm" fo:min-width="15.458cm" fo:padding-top="0.125cm" fo:padding-bottom="0.125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3cm" fo:min-width="0.453cm" fo:padding-top="0.125cm" fo:padding-bottom="0.125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2.46cm" fo:padding-top="0.125cm" fo:padding-bottom="0.125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6cm" fo:min-width="16.923cm" fo:padding-top="0.125cm" fo:padding-bottom="0.125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6cm" fo:min-width="15.458cm" fo:padding-top="0.125cm" fo:padding-bottom="0.125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4cm" fo:min-width="0.452cm" fo:padding-top="0.125cm" fo:padding-bottom="0.125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21.976cm" fo:padding-top="0.125cm" fo:padding-bottom="0.125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6cm" fo:min-width="16.914cm" fo:padding-top="0.125cm" fo:padding-bottom="0.125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6cm" fo:min-width="15.458cm" fo:padding-top="0.125cm" fo:padding-bottom="0.125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4cm" fo:min-width="0.452cm" fo:padding-top="0.125cm" fo:padding-bottom="0.125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9.083cm" fo:padding-top="0.125cm" fo:padding-bottom="0.125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6cm" fo:min-width="17.028cm" fo:padding-top="0.125cm" fo:padding-bottom="0.125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6cm" fo:min-width="15.458cm" fo:padding-top="0.125cm" fo:padding-bottom="0.125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4cm" fo:min-width="0.452cm" fo:padding-top="0.125cm" fo:padding-bottom="0.125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2.367cm" fo:padding-top="0.125cm" fo:padding-bottom="0.125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6cm" fo:min-width="17.364cm" fo:padding-top="0.125cm" fo:padding-bottom="0.125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6cm" fo:min-width="15.458cm" fo:padding-top="0.125cm" fo:padding-bottom="0.125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4cm" fo:min-width="0.686cm" fo:padding-top="0.125cm" fo:padding-bottom="0.125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6.393cm" fo:padding-top="0.125cm" fo:padding-bottom="0.125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6cm" fo:min-width="17.659cm" fo:padding-top="0.125cm" fo:padding-bottom="0.125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6cm" fo:min-width="15.458cm" fo:padding-top="0.125cm" fo:padding-bottom="0.125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4cm" fo:min-width="0.686cm" fo:padding-top="0.125cm" fo:padding-bottom="0.125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17.972cm" fo:padding-top="0.125cm" fo:padding-bottom="0.125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6cm" fo:min-width="17.099cm" fo:padding-top="0.125cm" fo:padding-bottom="0.125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6cm" fo:min-width="15.458cm" fo:padding-top="0.125cm" fo:padding-bottom="0.125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4cm" fo:min-width="0.453cm" fo:padding-top="0.125cm" fo:padding-bottom="0.125cm" fo:padding-left="0.25cm" fo:padding-right="0.25cm" fo:wrap-option="no-wrap" draw:shadow-color="#808080"/>
      <style:paragraph-properties style:writing-mode="lr-tb"/>
    </style:style>
    <style:style style:name="gr108" style:family="graphic" style:parent-style-name="Object_20_with_20_no_20_fill_20_and_20_no_20_line">
      <style:graphic-properties draw:textarea-horizontal-align="center" draw:textarea-vertical-align="middle" draw:fit-to-contour="true" fo:min-height="9.42cm" draw:visible-area-left="0cm" draw:visible-area-top="0cm" draw:visible-area-width="5cm" draw:visible-area-height="5cm" draw:ole-draw-aspect="1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6cm" fo:min-width="12.306cm" fo:padding-top="0.125cm" fo:padding-bottom="0.125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927cm" fo:min-width="15.383cm" fo:padding-top="0.125cm" fo:padding-bottom="0.125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07cm" fo:min-width="3.385cm" fo:padding-top="0.125cm" fo:padding-bottom="0.125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7cm" fo:min-width="9.968cm" fo:padding-top="0.125cm" fo:padding-bottom="0.125cm" fo:padding-left="0.25cm" fo:padding-right="0.25cm" fo:wrap-option="no-wrap" draw:shadow-color="#808080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46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fo:min-height="13.361cm" draw:shadow-color="#808080"/>
      <style:paragraph-properties style:writing-mode="lr-tb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12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6" style:family="presentation" style:parent-style-name="Title1-title">
      <style:graphic-properties fo:min-height="2.119cm"/>
      <style:paragraph-properties style:writing-mode="lr-tb"/>
    </style:style>
    <style:style style:name="pr7" style:family="presentation" style:parent-style-name="Title1-notes">
      <style:graphic-properties draw:fill-color="#ffffff" fo:min-height="13.357cm"/>
      <style:paragraph-properties style:writing-mode="lr-tb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12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.009cm" fo:margin-bottom="0.009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.009cm" fo:margin-bottom="0.009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009cm" fo:margin-bottom="0.009cm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009cm" fo:margin-bottom="0.009cm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margin-left="0cm" fo:margin-right="0cm" fo:margin-top="0.009cm" fo:margin-bottom="0.009cm" fo:line-height="93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009cm" fo:margin-bottom="0.00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.009cm" fo:margin-bottom="0.009cm" fo:line-height="83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margin-top="0.009cm" fo:margin-bottom="0.009cm" fo:line-height="93%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009cm" fo:margin-bottom="0.009cm" fo:line-height="93%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.953cm" fo:margin-right="0cm" fo:margin-top="0.176cm" fo:margin-bottom="0.009cm" fo:line-height="100%" fo:text-align="start" fo:text-indent="-0.953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4" style:family="paragraph">
      <loext:graphic-properties draw:fill="none" draw:fill-color="#ffffff"/>
      <style:paragraph-properties fo:margin-left="0.953cm" fo:margin-right="0cm" fo:margin-top="0.176cm" fo:margin-bottom="0.009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margin-top="0.106cm" fo:margin-bottom="0.106cm" fo:line-height="93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106cm" fo:margin-bottom="0.106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207cm" fo:margin-bottom="0.207cm" fo:line-height="93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loext:opacity="100%" style:text-position="0% 100%" style:font-name="Inter" fo:font-size="30pt" fo:language="en" fo:country="US" style:font-size-asian="30pt" style:language-asian="en" style:country-asian="US" style:font-size-complex="30pt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style:font-name="Inter" fo:font-size="35pt" fo:language="en" fo:country="US" style:font-size-asian="35pt" style:language-asian="en" style:country-asian="US" style:font-size-complex="35pt" style:language-complex="en" style:country-complex="US"/>
    </style:style>
    <style:style style:name="T6" style:family="text">
      <style:text-properties fo:font-size="35pt" fo:language="en" fo:country="US" style:font-size-asian="35pt" style:language-asian="en" style:country-asian="US" style:font-size-complex="35pt" style:language-complex="en" style:country-complex="US"/>
    </style:style>
    <style:style style:name="T7" style:family="text">
      <style:text-properties style:font-name="Inter"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9" style:family="text">
      <style:text-properties style:font-name="Inter" fo:font-size="34pt" fo:language="en" fo:country="US" style:font-size-asian="34pt" style:language-asian="en" style:country-asian="US" style:font-size-complex="34pt" style:language-complex="en" style:country-complex="US"/>
    </style:style>
    <style:style style:name="T10" style:family="text">
      <style:text-properties fo:color="#000000" loext:opacity="100%" style:text-position="0% 100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color="#000000" loext:opacity="100%" style:text-position="0% 100%" style:font-name="Inter" fo:font-size="14pt" fo:language="en" fo:country="US" style:font-name-asian="Noto Sans CJK SC1" style:font-size-asian="14pt" style:language-asian="en" style:country-asian="US" style:font-name-complex="Noto Sans CJK SC1" style:font-size-complex="14pt" style:language-complex="en" style:country-complex="US"/>
    </style:style>
    <style:style style:name="T12" style:family="text">
      <style:text-properties fo:color="#158466" loext:opacity="100%" style:font-name="Inter"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color="#bf0041" loext:opacity="100%" style:font-name="Inter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fo:color="#000000" loext:opacity="100%" style:font-name="Inter" fo:font-size="14pt" fo:language="en" fo:country="US" style:font-size-asian="14pt" style:language-asian="en" style:country-asian="US" style:font-size-complex="14pt" style:language-complex="en" style:country-complex="US"/>
    </style:style>
    <style:style style:name="T15" style:family="text">
      <style:text-properties style:font-name="Inter" fo:language="en" fo:country="US" style:language-asian="en" style:country-asian="US" style:language-complex="en" style:country-complex="US"/>
    </style:style>
    <style:style style:name="T16" style:family="text">
      <style:text-properties style:font-name="Inter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style:font-name="Inter" fo:font-size="32pt" fo:language="en" fo:country="US" style:font-size-asian="32pt" style:language-asian="en" style:country-asian="US" style:font-size-complex="32pt" style:language-complex="en" style:country-complex="US"/>
    </style:style>
    <style:style style:name="T18" style:family="text">
      <style:text-properties style:font-name="Inter"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fo:color="#ff8000" loext:opacity="100%" fo:language="en" fo:country="US" style:language-asian="en" style:country-asian="US" style:language-complex="en" style:country-complex="US"/>
    </style:style>
    <style:style style:name="T20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1" style:family="text">
      <style:text-properties style:font-name="Inter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">
        <style:list-level-properties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2.86cm" svg:height="5.596cm" svg:x="1.27cm" svg:y="0.556cm">
          <text:list text:style-name="L1">
            <text:list-header>
              <text:p text:style-name="P1"><text:span text:style-name="T1">db-LaCAM: Fast and Scalable Multi-Robot Kinodynamic Motion Planning with Discontinuity-Bounded Search and Lightweight MAP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5.927cm" svg:height="0.758cm" svg:x="1.27cm" svg:y="12.643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1.74cm" svg:height="0.957cm" svg:x="1.905cm" svg:y="6.795cm">
          <text:list text:style-name="L1">
            <text:list-header>
              <text:p text:style-name="P4"><text:span text:style-name="T2">Akmaral Moldagalieva, Keisuke Okumura, Amanda Prorok, Wolfgang Höni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2.03cm" svg:height="0.957cm" svg:x="6.253cm" svg:y="7.867cm">
          <text:list text:style-name="L1">
            <text:list-header>
              <text:p text:style-name="P4"><text:span text:style-name="T3">TU Berlin, AIST, University of Cambrid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3.197cm" svg:height="0.878cm" svg:x="10.804cm" svg:y="9.635cm">
          <text:list text:style-name="L1">
            <text:list-header>
              <text:p text:style-name="P4"><text:span text:style-name="T4">AAAI 20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4.859cm" svg:height="0.878cm" svg:x="9.997cm" svg:y="10.332cm">
          <text:list text:style-name="L1">
            <text:list-header>
              <text:p text:style-name="P6"><text:span text:style-name="T4">January 27, 202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28cm" svg:height="1.694cm" svg:x="2.606cm" svg:y="11.465cm">
          <draw:image xlink:href="Pictures/100000000000020B00000185707DFC3064A4ADEB.png" xlink:type="simple" xlink:show="embed" xlink:actuate="onLoad" draw:mime-type="image/png">
            <text:p/>
          </draw:image>
        </draw:frame>
        <draw:frame draw:style-name="gr7" draw:text-style-name="P8" draw:layer="layout" svg:width="5.715cm" svg:height="1.006cm" svg:x="8.692cm" svg:y="11.862cm">
          <draw:image xlink:href="Pictures/10000001000000BB0000002129DF9175F90312E7.png" xlink:type="simple" xlink:show="embed" xlink:actuate="onLoad" draw:mime-type="image/png">
            <text:p/>
          </draw:image>
        </draw:frame>
        <draw:frame draw:style-name="gr7" draw:text-style-name="P8" draw:layer="layout" svg:width="6.381cm" svg:height="1.327cm" svg:x="17.149cm" svg:y="11.743cm">
          <draw:image xlink:href="Pictures/100000010000093B000001EC2238E9E7DF66374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9cm" svg:height="11.134cm" svg:x="0.6cm" svg:y="2.258cm" draw:page-number="1" presentation:class="page"/>
          <draw:frame presentation:style-name="pr1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1">
        <office:forms form:automatic-focus="false" form:apply-design-mode="false"/>
        <draw:frame presentation:style-name="pr2" draw:text-style-name="P3" draw:layer="layout" svg:width="22.856cm" svg:height="2.717cm" svg:x="1.27cm" svg:y="0.4cm" presentation:class="title" presentation:user-transformed="true">
          <draw:text-box>
            <text:list text:style-name="L1">
              <text:list-header>
                <text:p text:style-name="P10"><text:span text:style-name="T5">Multi</text:span><text:span text:style-name="T6">-</text:span><text:span text:style-name="T5">Robot</text:span><text:span text:style-name="T6"> Kinodynamic </text:span><text:span text:style-name="T6">MotionPlanning: <text:s text:c="24"/></text:span><text:span text:style-name="T6"><text:s text:c="2"/>Fast, Real-World</text:span></text:p>
              </text:list-header>
            </text:list>
          </draw:text-box>
        </draw:frame>
        <draw:frame draw:style-name="standard" draw:layer="layout" svg:width="19.19cm" svg:height="10.795cm" svg:x="3.81cm" svg:y="3.04cm">
          <draw:plugin xlink:href="Media/dblacam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8" draw:layer="layout" svg:width="19.795cm" svg:height="11.13cm" svg:x="0.6cm" svg:y="2.258cm" draw:page-number="2" presentation:class="page"/>
          <draw:frame presentation:style-name="pr3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1">
        <office:forms form:automatic-focus="false" form:apply-design-mode="false"/>
        <draw:frame presentation:style-name="pr2" draw:text-style-name="P3" draw:layer="layout" svg:width="22.856cm" svg:height="2.717cm" svg:x="1.27cm" svg:y="0.4cm" presentation:class="title" presentation:user-transformed="true">
          <draw:text-box>
            <text:list text:style-name="L1">
              <text:list-header>
                <text:p text:style-name="P10"><text:span text:style-name="T5">Multi</text:span><text:span text:style-name="T6">-</text:span><text:span text:style-name="T5">Robot</text:span><text:span text:style-name="T6"> Kinodynamic </text:span><text:span text:style-name="T6">MotionPlanning: <text:s text:c="24"/></text:span><text:span text:style-name="T6"><text:s text:c="2"/>Fast, Scalable</text:span></text:p>
              </text:list-header>
            </text:list>
          </draw:text-box>
        </draw:frame>
        <draw:frame draw:style-name="standard" draw:layer="layout" svg:width="19.685cm" svg:height="11.073cm" svg:x="2.84cm" svg:y="3.141cm">
          <draw:plugin xlink:href="Media/n50-10x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custom-shape draw:style-name="gr9" draw:text-style-name="P12" draw:layer="layout" svg:width="9.198cm" svg:height="1.359cm" svg:x="13.027cm" svg:y="11.63cm">
          <text:list text:style-name="L1">
            <text:list-header>
              <text:p text:style-name="P11"><text:span text:style-name="T7">db-CBS, db-ECBS – state-of-the-art </text:span></text:p>
              <text:p text:style-name="P11"><text:span text:style-name="T7">kinodynamic plann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1.187cm" svg:height="0.724cm" svg:x="11.948cm" svg:y="10.821cm">
          <text:list text:style-name="L1">
            <text:list-header>
              <text:p text:style-name="P4"><text:span text:style-name="T8">x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9.795cm" svg:height="11.13cm" svg:x="0.6cm" svg:y="2.258cm" draw:page-number="3" presentation:class="page"/>
          <draw:frame presentation:style-name="pr3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9">Multi-Robot Coordination</text:span></text:p>
              </text:list-header>
            </text:list>
          </draw:text-box>
        </draw:frame>
        <draw:custom-shape draw:style-name="gr11" draw:text-style-name="P14" draw:layer="layout" svg:width="22.225cm" svg:height="9.587cm" svg:x="1.905cm" svg:y="3.175cm">
          <text:list text:style-name="L1">
            <text:list-header>
              <text:p text:style-name="P13"><text:span text:style-name="T10"/></text:p>
              <text:p text:style-name="P1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draw:layer="layout" svg:width="7.196cm" svg:height="0.957cm" svg:x="8.811cm" svg:y="2.377cm">
          <text:list text:style-name="L1">
            <text:list-header>
              <text:p text:style-name="P4"><text:span text:style-name="T2">Discrete vs. Continuo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2" xml:id="id1" draw:id="id1" draw:layer="layout" svg:width="8.339cm" svg:height="1.358cm" svg:x="2.359cm" svg:y="12.065cm">
          <text:list text:style-name="L2">
            <text:list-item>
              <text:p text:style-name="P11"><text:span text:style-name="T7"><text:s/></text:span><text:span text:style-name="T7">Discrete time steps</text:span></text:p>
            </text:list-item>
            <text:list-item>
              <text:p text:style-name="P11"><text:span text:style-name="T7"><text:s/></text:span><text:span text:style-name="T7">Grid representation of the worl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2" xml:id="id3" draw:id="id3" draw:layer="layout" svg:width="6.508cm" svg:height="1.358cm" svg:x="14.16cm" svg:y="12.268cm">
          <text:list text:style-name="L2">
            <text:list-item>
              <text:p text:style-name="P11"><text:span text:style-name="T7"><text:s/></text:span><text:span text:style-name="T7">Continuous state &amp; time</text:span></text:p>
            </text:list-item>
            <text:list-item>
              <text:p text:style-name="P11"><text:span text:style-name="T7"><text:s/></text:span><text:span text:style-name="T7">Infinite possible mo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21.114cm" svg:height="0.803cm" svg:x="2.209cm" svg:y="3.911cm">
          <text:list text:style-name="L1">
            <text:list-header>
              <text:p text:style-name="P6"><text:span text:style-name="T11">Multi-Agent Path Finding (MAPF) <text:s text:c="27"/></text:span><text:span text:style-name="T7">Multi-Robot Motion Planning (MRMP)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xml:id="id2" draw:id="id2" draw:layer="layout" svg:width="9.812cm" svg:height="6.54cm" svg:x="2.006cm" svg:y="4.89cm">
          <draw:image xlink:href="Pictures/10000001000002370000017A668C8911D5419252.png" xlink:type="simple" xlink:show="embed" xlink:actuate="onLoad" draw:mime-type="image/png">
            <text:p/>
          </draw:image>
        </draw:frame>
        <draw:frame draw:style-name="gr7" draw:text-style-name="P8" xml:id="id4" draw:id="id4" draw:layer="layout" svg:width="9.803cm" svg:height="6.527cm" svg:x="13.736cm" svg:y="4.78cm">
          <draw:image xlink:href="Pictures/10000001000002370000017AAD1BBE2C9AD93B0F.png" xlink:type="simple" xlink:show="embed" xlink:actuate="onLoad" draw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9.795cm" svg:height="11.134cm" svg:x="0.6cm" svg:y="2.258cm" draw:page-number="4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9">Multi-Robot Coordination: </text:span><text:span text:style-name="T9">SOTA</text:span></text:p>
              </text:list-header>
            </text:list>
          </draw:text-box>
        </draw:frame>
        <draw:custom-shape draw:style-name="gr16" draw:text-style-name="P3" draw:layer="layout" svg:width="22.225cm" svg:height="9.587cm" svg:x="1.905cm" svg:y="3.175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7.197cm" svg:height="0.957cm" svg:x="8.815cm" svg:y="2.39cm">
          <text:list text:style-name="L1">
            <text:list-header>
              <text:p text:style-name="P4"><text:span text:style-name="T2">Discrete vs. Continuo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2" draw:layer="layout" svg:width="10.16cm" svg:height="1.919cm" svg:x="1.64cm" svg:y="4.912cm">
          <text:list text:style-name="L2">
            <text:list-item>
              <text:p text:style-name="P11"><text:span text:style-name="T12"><text:s/></text:span><text:span text:style-name="T12">Fast</text:span></text:p>
            </text:list-item>
            <text:list-item>
              <text:p text:style-name="P11"><text:span text:style-name="T7"><text:s/></text:span><text:span text:style-name="T12">Scales</text:span><text:span text:style-name="T7"> </text:span><text:span text:style-name="T12">well</text:span><text:span text:style-name="T7"> with &gt;1000 agents</text:span></text:p>
            </text:list-item>
            <text:list-item>
              <text:p text:style-name="P11"><text:span text:style-name="T7"><text:s/></text:span><text:span text:style-name="T7">Output can be </text:span><text:span text:style-name="T13">infeasible </text:span><text:span text:style-name="T7">for real robot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2" draw:layer="layout" svg:width="9.785cm" svg:height="1.358cm" svg:x="13.741cm" svg:y="4.917cm">
          <text:list text:style-name="L2">
            <text:list-item>
              <text:p text:style-name="P11"><text:span text:style-name="T14"><text:s/></text:span><text:span text:style-name="T14">Output </text:span><text:span text:style-name="T12">respects robot dynamics</text:span></text:p>
            </text:list-item>
            <text:list-item>
              <text:p text:style-name="P11"><text:span text:style-name="T7"><text:s/></text:span><text:span text:style-name="T13">Slow</text:span><text:span text:style-name="T7">, </text:span><text:span text:style-name="T13">scale poorly</text:span><text:span text:style-name="T7"> beyond few robot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7" draw:layer="layout" svg:width="14.46cm" svg:height="0.802cm" svg:x="1.111cm" svg:y="4.013cm">
          <text:list text:style-name="L1">
            <text:list-header>
              <text:p text:style-name="P6"><text:span text:style-name="T11">MAPF: <text:s text:c="74"/></text:span><text:span text:style-name="T7">MRMP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9.79cm" svg:height="7.343cm" svg:x="1.44cm" svg:y="6.931cm">
          <draw:plugin xlink:href="Media/mapf-exampl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9.779cm" svg:height="7.341cm" svg:x="13.835cm" svg:y="6.934cm">
          <draw:plugin xlink:href="Media/mrmp-exampl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8" draw:layer="layout" svg:width="19.795cm" svg:height="11.134cm" svg:x="0.6cm" svg:y="2.258cm" draw:page-number="5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9">Motivation</text:span></text:p>
              </text:list-header>
            </text:list>
          </draw:text-box>
        </draw:frame>
        <draw:custom-shape draw:style-name="gr16" draw:text-style-name="P3" draw:layer="layout" svg:width="22.225cm" svg:height="9.587cm" svg:x="1.905cm" svg:y="3.175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10.16cm" svg:height="1.919cm" svg:x="1.64cm" svg:y="4.912cm">
          <text:list text:style-name="L2">
            <text:list-item>
              <text:p text:style-name="P11"><text:span text:style-name="T12"><text:s/></text:span><text:span text:style-name="T12">Fast</text:span></text:p>
            </text:list-item>
            <text:list-item>
              <text:p text:style-name="P11"><text:span text:style-name="T7"><text:s/></text:span><text:span text:style-name="T12">Scales</text:span><text:span text:style-name="T7"> </text:span><text:span text:style-name="T12">well</text:span><text:span text:style-name="T7"> with &gt;1000 agents</text:span></text:p>
            </text:list-item>
            <text:list-item>
              <text:p text:style-name="P11"><text:span text:style-name="T7"><text:s/></text:span><text:span text:style-name="T7">Output can be </text:span><text:span text:style-name="T13">infeasible </text:span><text:span text:style-name="T7">for real robot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2" draw:layer="layout" svg:width="9.785cm" svg:height="1.358cm" svg:x="13.741cm" svg:y="4.917cm">
          <text:list text:style-name="L2">
            <text:list-item>
              <text:p text:style-name="P11"><text:span text:style-name="T14"><text:s/></text:span><text:span text:style-name="T14">Output </text:span><text:span text:style-name="T12">respects robot dynamics</text:span></text:p>
            </text:list-item>
            <text:list-item>
              <text:p text:style-name="P11"><text:span text:style-name="T7"><text:s/></text:span><text:span text:style-name="T13">Slow</text:span><text:span text:style-name="T7">, </text:span><text:span text:style-name="T13">scale poorly</text:span><text:span text:style-name="T7"> beyond few robot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7" draw:layer="layout" svg:width="14.46cm" svg:height="0.802cm" svg:x="1.111cm" svg:y="4.013cm">
          <text:list text:style-name="L1">
            <text:list-header>
              <text:p text:style-name="P6"><text:span text:style-name="T11">MAPF: <text:s text:c="74"/></text:span><text:span text:style-name="T7">MRMP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3" draw:layer="layout" svg:width="2.77cm" svg:height="1.297cm" svg:x="2.103cm" svg:y="4.9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6.2cm" svg:height="0.582cm" svg:x="15.976cm" svg:y="4.9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20.205cm" svg:height="1.746cm" svg:x="2.368cm" svg:y="9.838cm">
          <text:list text:style-name="L1">
            <text:list-header>
              <text:p xml:id="id5" text:id="id5" text:style-name="P11"><text:span text:style-name="T15">Fast, scalable, dynamic-aware planner </text:span><text:span text:style-name="T16">for</text:span><text:span text:style-name="T15"> multi-robot systems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6.985cm" svg:height="5.243cm" svg:x="22.86cm" svg:y="15.077cm">
          <draw:image xlink:href="Pictures/1000000100000266000001CD735FE35BEF552BF2.png" xlink:type="simple" xlink:show="embed" xlink:actuate="onLoad" draw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8" draw:layer="layout" svg:width="19.795cm" svg:height="11.134cm" svg:x="0.6cm" svg:y="2.258cm" draw:page-number="6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</text:span></text:p>
              </text:list-header>
            </text:list>
          </draw:text-box>
        </draw:frame>
        <draw:custom-shape draw:style-name="gr27" draw:text-style-name="P5" draw:layer="layout" svg:width="15.227cm" svg:height="0.957cm" svg:x="1.08cm" svg:y="2.712cm">
          <text:list text:style-name="L1">
            <text:list-header>
              <text:p text:style-name="P4"><text:span text:style-name="T2">Our planner, db-LaCAM, is built upon two core ide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xml:id="id6" draw:id="id6" draw:layer="layout" svg:width="5.715cm" svg:height="5.715cm" svg:x="1.804cm" svg:y="5.781cm">
          <draw:image xlink:href="Pictures/100000010000017A0000017A21D4FB42E62E09FF.png" xlink:type="simple" xlink:show="embed" xlink:actuate="onLoad" draw:mime-type="image/png">
            <text:p/>
          </draw:image>
        </draw:frame>
        <draw:custom-shape draw:style-name="gr28" draw:text-style-name="P12" xml:id="id7" draw:id="id7" draw:layer="layout" svg:width="8.793cm" svg:height="1.517cm" svg:x="0.961cm" svg:y="11.161cm">
          <text:list text:style-name="L1">
            <text:list-header>
              <text:p text:style-name="P11"><text:span text:style-name="T18">Allows discontinuity-bound ( <text:s/>) </text:span></text:p>
              <text:p text:style-name="P11"><text:span text:style-name="T18">between sta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8" xml:id="id8" draw:id="id8" draw:layer="layout" svg:width="0.507cm" svg:height="0.508cm" svg:x="8.696cm" svg:y="11.3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0" draw:text-style-name="P12" xml:id="id9" draw:id="id9" draw:layer="layout" svg:width="8.546cm" svg:height="0.878cm" svg:x="1.371cm" svg:y="5.415cm">
          <text:list text:style-name="L1">
            <text:list-header>
              <text:p text:style-name="P11"><text:span text:style-name="T18">1. discontinuity-bound search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2" xml:id="id10" draw:id="id10" draw:layer="layout" svg:width="5.896cm" svg:height="0.878cm" svg:x="14.971cm" svg:y="5.415cm">
          <text:list text:style-name="L1">
            <text:list-header>
              <text:p text:style-name="P11"><text:span text:style-name="T18">2. LaCAM algorithm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xml:id="id11" draw:id="id11" draw:layer="layout" svg:width="6.552cm" svg:height="4.37cm" svg:x="15.042cm" svg:y="6.425cm">
          <draw:image xlink:href="Pictures/10000001000002370000017A668C8911D5419252.png" xlink:type="simple" xlink:show="embed" xlink:actuate="onLoad" draw:mime-type="image/png">
            <text:p/>
          </draw:image>
        </draw:frame>
        <draw:custom-shape draw:style-name="gr32" draw:text-style-name="P12" xml:id="id12" draw:id="id12" draw:layer="layout" svg:width="8.873cm" svg:height="0.878cm" svg:x="13.961cm" svg:y="11.161cm">
          <text:list text:style-name="L1">
            <text:list-header>
              <text:p text:style-name="P11"><text:span text:style-name="T18">Search-based graph pathfinde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9.795cm" svg:height="11.134cm" svg:x="0.6cm" svg:y="2.258cm" draw:page-number="7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</text:span></text:p>
              </text:list-header>
            </text:list>
          </draw:text-box>
        </draw:frame>
        <draw:custom-shape draw:style-name="gr33" draw:text-style-name="P5" draw:layer="layout" svg:width="16.599cm" svg:height="0.957cm" svg:x="1.08cm" svg:y="2.712cm">
          <text:list text:style-name="L1">
            <text:list-header>
              <text:p text:style-name="P4"><text:span text:style-name="T2">Extending LaCAM to the continuous domain is </text:span><text:span text:style-name="T19">non-trivial</text:span><text:span text:style-name="T2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" draw:layer="layout" svg:width="4.021cm" svg:height="0.957cm" svg:x="1.169cm" svg:y="4.463cm">
          <text:list text:style-name="L1">
            <text:list-header>
              <text:p text:style-name="P4"><text:span text:style-name="T2">Challenges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6" draw:layer="layout" svg:width="14.892cm" svg:height="2.549cm" svg:x="3.911cm" svg:y="5.45cm">
          <text:list text:style-name="L2">
            <text:list-item>
              <text:p text:style-name="P15"><text:span text:style-name="T18">Continuous state space;</text:span></text:p>
            </text:list-item>
            <text:list-item>
              <text:p text:style-name="P15"><text:span text:style-name="T18">Constraints from robot dynamics;</text:span></text:p>
            </text:list-item>
            <text:list-item>
              <text:p text:style-name="P15"><text:span text:style-name="T18">Harder heuristic estimation – Euclidean distance fail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9.795cm" svg:height="11.134cm" svg:x="0.6cm" svg:y="2.258cm" draw:page-number="8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</text:span></text:p>
              </text:list-header>
            </text:list>
          </draw:text-box>
        </draw:frame>
        <draw:custom-shape draw:style-name="gr36" draw:text-style-name="P16" draw:layer="layout" svg:width="23.469cm" svg:height="1.874cm" svg:x="1.08cm" svg:y="2.712cm">
          <text:list text:style-name="L1">
            <text:list-header>
              <text:p text:style-name="P15"><text:span text:style-name="T2">The planner db-LaCAM uses db-PIBT to generate </text:span><text:span text:style-name="T19">fixed-length horizon</text:span><text:span text:style-name="T2"> trajectories</text:span></text:p>
              <text:p text:style-name="P15"><text:span text:style-name="T2">using </text:span><text:span text:style-name="T19">motion primitives</text:span><text:span text:style-name="T20">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3.996cm" svg:height="6.006cm" svg:x="5.054cm" svg:y="4.789cm">
          <draw:image xlink:href="Pictures/1000000100000211000000E305D7A7D960EFFB8A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9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37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9.68cm" svg:height="0.957cm" svg:x="1.23cm" svg:y="4.119cm">
          <text:list text:style-name="L1">
            <text:list-header>
              <text:p text:style-name="P11"><text:span text:style-name="T15">Step 1: find applicable mo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2cm" svg:x="5.715cm" svg:y="5.689cm">
          <draw:image xlink:href="Pictures/1000000100000448000002A8E3B9DAD006F76A1E.png" xlink:type="simple" xlink:show="embed" xlink:actuate="onLoad" draw:mime-type="image/png">
            <text:p/>
          </draw:image>
        </draw:frame>
        <draw:custom-shape draw:style-name="gr39" draw:text-style-name="P12" draw:layer="layout" svg:width="2.518cm" svg:height="0.802cm" svg:x="8.687cm" svg:y="12.9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2" draw:layer="layout" svg:width="2.518cm" svg:height="0.803cm" svg:x="16.087cm" svg:y="5.2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9.795cm" svg:height="11.134cm" svg:x="0.6cm" svg:y="2.258cm" draw:page-number="10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41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2" draw:layer="layout" svg:width="10.698cm" svg:height="0.957cm" svg:x="1.23cm" svg:y="4.119cm">
          <text:list text:style-name="L1">
            <text:list-header>
              <text:p text:style-name="P11"><text:span text:style-name="T15">Step 2: rollout applicable motion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2" draw:layer="layout" svg:width="2.518cm" svg:height="0.802cm" svg:x="8.687cm" svg:y="12.9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2" draw:layer="layout" svg:width="2.518cm" svg:height="0.803cm" svg:x="16.087cm" svg:y="5.2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9cm">
          <draw:image xlink:href="Pictures/1000000100000448000002A87D22A8E7EB073AEE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11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45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2" draw:layer="layout" svg:width="16.665cm" svg:height="0.957cm" svg:x="1.23cm" svg:y="4.119cm">
          <text:list text:style-name="L1">
            <text:list-header>
              <text:p text:style-name="P11"><text:span text:style-name="T15">Step 3: <text:s/>compute cost-to-go (h) with Hierarchical 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2" draw:layer="layout" svg:width="2.518cm" svg:height="0.802cm" svg:x="8.687cm" svg:y="12.9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2" draw:layer="layout" svg:width="2.518cm" svg:height="0.803cm" svg:x="16.087cm" svg:y="5.2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cm">
          <draw:image xlink:href="Pictures/1000000100000448000002A87B4B4920FE716020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12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49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2" draw:layer="layout" svg:width="15.505cm" svg:height="0.957cm" svg:x="1.23cm" svg:y="4.119cm">
          <text:list text:style-name="L1">
            <text:list-header>
              <text:p text:style-name="P11"><text:span text:style-name="T15">Step 4: sort motions based on h-value and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2" draw:layer="layout" svg:width="2.518cm" svg:height="0.802cm" svg:x="8.687cm" svg:y="12.9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2" draw:layer="layout" svg:width="2.518cm" svg:height="0.803cm" svg:x="16.087cm" svg:y="5.2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9cm">
          <draw:image xlink:href="Pictures/1000000100000448000002A8DC76DC28740B71CC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13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53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2" draw:layer="layout" svg:width="13.653cm" svg:height="0.957cm" svg:x="1.23cm" svg:y="4.119cm">
          <text:list text:style-name="L1">
            <text:list-header>
              <text:p text:style-name="P11"><text:span text:style-name="T15">Step 5: pick the best motion for both rob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2" draw:layer="layout" svg:width="2.518cm" svg:height="0.802cm" svg:x="8.687cm" svg:y="12.9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2" draw:layer="layout" svg:width="2.518cm" svg:height="0.803cm" svg:x="16.087cm" svg:y="5.234cm">
          <text:list text:style-name="L1">
            <text:list-header>
              <text:p text:style-name="P11"><text:span text:style-name="T7">horizon 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9cm">
          <draw:image xlink:href="Pictures/1000000100000448000002A8C9FB2B920DE3B710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14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57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2" draw:layer="layout" svg:width="14.68cm" svg:height="0.957cm" svg:x="1.23cm" svg:y="4.119cm">
          <text:list text:style-name="L1">
            <text:list-header>
              <text:p text:style-name="P11"><text:span text:style-name="T15">Rollout motions for Robot 1 for the next horiz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2" draw:layer="layout" svg:width="3.153cm" svg:height="1.35cm" svg:x="9.547cm" svg:y="13.16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9cm">
          <draw:image xlink:href="Pictures/1000000100000448000002A8904D9C302B76E4A9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15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60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2" draw:layer="layout" svg:width="14.768cm" svg:height="0.957cm" svg:x="1.23cm" svg:y="4.119cm">
          <text:list text:style-name="L1">
            <text:list-header>
              <text:p text:style-name="P11"><text:span text:style-name="T15">Rollout motions for Robot 2 for the next horiz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2" draw:layer="layout" svg:width="3.153cm" svg:height="1.35cm" svg:x="9.547cm" svg:y="13.16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9cm">
          <draw:image xlink:href="Pictures/1000000100000448000002A8951EF781A199CE9E.png" xlink:type="simple" xlink:show="embed" xlink:actuate="onLoad" draw:mime-type="image/png">
            <text:p/>
          </draw:image>
        </draw:frame>
        <draw:custom-shape draw:style-name="gr63" draw:text-style-name="P12" draw:layer="layout" svg:width="3.153cm" svg:height="1.349cm" svg:x="12.347cm" svg:y="5.2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9.795cm" svg:height="11.134cm" svg:x="0.6cm" svg:y="2.258cm" draw:page-number="16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64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2" draw:layer="layout" svg:width="22.146cm" svg:height="0.957cm" svg:x="1.23cm" svg:y="4.119cm">
          <text:list text:style-name="L1">
            <text:list-header>
              <text:p text:style-name="P11"><text:span text:style-name="T15">Robot 1 has potential collision with Robot 2 – Priority Inheritance R1 <text:s text:c="3"/>R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2" draw:layer="layout" svg:width="3.153cm" svg:height="1.35cm" svg:x="9.547cm" svg:y="13.16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2" draw:layer="layout" svg:width="3.153cm" svg:height="1.349cm" svg:x="12.347cm" svg:y="5.2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8" draw:layer="layout" svg:width="2.465cm" svg:height="1.296cm" svg:x="21.691cm" svg:y="4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8" draw:layer="layout" svg:width="14.605cm" svg:height="9.066cm" svg:x="5.715cm" svg:y="5.689cm">
          <draw:image xlink:href="Pictures/1000000100000448000002A8DD9FC184786917AE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17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68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2" draw:layer="layout" svg:width="15.981cm" svg:height="0.957cm" svg:x="1.23cm" svg:y="4.119cm">
          <text:list text:style-name="L1">
            <text:list-header>
              <text:p text:style-name="P11"><text:span text:style-name="T15">With priority inheritance Robot 2 plans its traj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2" draw:layer="layout" svg:width="3.153cm" svg:height="1.35cm" svg:x="9.547cm" svg:y="13.16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2" draw:layer="layout" svg:width="3.153cm" svg:height="1.349cm" svg:x="12.347cm" svg:y="5.2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9cm">
          <draw:image xlink:href="Pictures/1000000100000448000002A823D47E6650237F9D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18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72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2" draw:layer="layout" svg:width="15.822cm" svg:height="0.957cm" svg:x="1.23cm" svg:y="4.119cm">
          <text:list text:style-name="L1">
            <text:list-header>
              <text:p text:style-name="P11"><text:span text:style-name="T15">Once Robot 2 has plan, Robot 1 reserves its mo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2" draw:layer="layout" svg:width="3.153cm" svg:height="1.35cm" svg:x="9.547cm" svg:y="13.16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2" draw:layer="layout" svg:width="3.153cm" svg:height="1.349cm" svg:x="12.347cm" svg:y="5.27cm">
          <text:list text:style-name="L1">
            <text:list-header>
              <text:p text:style-name="P11"><text:span text:style-name="T7">horizon I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9cm">
          <draw:image xlink:href="Pictures/1000000100000448000002A8CB036F119B136A3E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19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Approach: db-LaCAM</text:span></text:p>
              </text:list-header>
            </text:list>
          </draw:text-box>
        </draw:frame>
        <draw:custom-shape draw:style-name="gr76" draw:text-style-name="P16" draw:layer="layout" svg:width="17.339cm" svg:height="0.957cm" svg:x="4.48cm" svg:y="2.712cm">
          <text:list text:style-name="L1">
            <text:list-header>
              <text:p text:style-name="P15"><text:span text:style-name="T15">db-PIBT planning fixed-length horizon robot traj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2" draw:layer="layout" svg:width="11.571cm" svg:height="0.957cm" svg:x="1.23cm" svg:y="4.119cm">
          <text:list text:style-name="L1">
            <text:list-header>
              <text:p text:style-name="P11"><text:span text:style-name="T15">Plan until all robots reach goal st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2" draw:layer="layout" svg:width="3.153cm" svg:height="1.349cm" svg:x="15.998cm" svg:y="11.43cm">
          <text:list text:style-name="L1">
            <text:list-header>
              <text:p text:style-name="P11"><text:span text:style-name="T7">horizon I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2" draw:layer="layout" svg:width="3.153cm" svg:height="1.349cm" svg:x="8.912cm" svg:y="5.636cm">
          <text:list text:style-name="L1">
            <text:list-header>
              <text:p text:style-name="P11"><text:span text:style-name="T7">horizon II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4.605cm" svg:height="9.066cm" svg:x="5.715cm" svg:y="5.689cm">
          <draw:image xlink:href="Pictures/1000000100000448000002A85A042262936B0456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5cm" svg:height="11.134cm" svg:x="0.6cm" svg:y="2.258cm" draw:page-number="20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Experimental Results</text:span></text:p>
              </text:list-header>
            </text:list>
          </draw:text-box>
        </draw:frame>
        <draw:custom-shape draw:style-name="gr80" draw:text-style-name="P12" draw:layer="layout" svg:width="5.243cm" svg:height="0.957cm" svg:x="1.729cm" svg:y="2.677cm">
          <text:list text:style-name="L1">
            <text:list-header>
              <text:p text:style-name="P11"><text:span text:style-name="T15">AtGoal in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2" draw:layer="layout" svg:width="17.326cm" svg:height="1.676cm" svg:x="2.064cm" svg:y="12.263cm">
          <text:list text:style-name="L1">
            <text:list-header>
              <text:p text:style-name="P11"><text:span text:style-name="T15">Runtime [s] <text:s text:c="9"/>2.1 <text:s text:c="21"/>0.2 <text:s text:c="24"/></text:span><text:span text:style-name="T21">0.02</text:span></text:p>
              <text:p text:style-name="P11"><text:span text:style-name="T15">Cost [s] <text:s text:c="15"/></text:span><text:span text:style-name="T21">9.1 </text:span><text:span text:style-name="T15"><text:s text:c="21"/>9.2 <text:s text:c="24"/>16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2" draw:layer="layout" svg:width="15.958cm" svg:height="0.956cm" svg:x="6.487cm" svg:y="11.329cm">
          <text:list text:style-name="L1">
            <text:list-header>
              <text:p text:style-name="P11"><text:span text:style-name="T15">db-CBS <text:s text:c="14"/>db-ECBS <text:s text:c="13"/>db-LaCAM (ours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0.795cm" svg:height="8.096cm" svg:x="6.985cm" svg:y="3.904cm">
          <draw:plugin xlink:href="Media/atgoal3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custom-shape draw:style-name="gr83" draw:text-style-name="P5" draw:layer="layout" svg:width="0.953cm" svg:height="0.723cm" svg:x="17.027cm" svg:y="9.86cm">
          <text:list text:style-name="L1">
            <text:list-header>
              <text:p text:style-name="P4"><text:span text:style-name="T8">x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9.795cm" svg:height="11.134cm" svg:x="0.6cm" svg:y="2.258cm" draw:page-number="21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Experimental Results</text:span></text:p>
              </text:list-header>
            </text:list>
          </draw:text-box>
        </draw:frame>
        <draw:custom-shape draw:style-name="gr84" draw:text-style-name="P12" draw:layer="layout" svg:width="12.96cm" svg:height="0.957cm" svg:x="1.429cm" svg:y="2.377cm">
          <text:list text:style-name="L1">
            <text:list-header>
              <text:p text:style-name="P11"><text:span text:style-name="T15">Circle instance with N=10 unicycle rob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2" draw:layer="layout" svg:width="17.423cm" svg:height="1.676cm" svg:x="2.064cm" svg:y="12.263cm">
          <text:list text:style-name="L1">
            <text:list-header>
              <text:p text:style-name="P11"><text:span text:style-name="T15">Runtime [s] <text:s text:c="9"/>9.0 <text:s text:c="21"/>14.1 <text:s text:c="24"/></text:span><text:span text:style-name="T21">1.1</text:span></text:p>
              <text:p text:style-name="P11"><text:span text:style-name="T15">Cost [s] <text:s text:c="12"/></text:span><text:span text:style-name="T21"><text:s/>157.8 </text:span><text:span text:style-name="T15"><text:s text:c="18"/>159.9 <text:s text:c="20"/>196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2" draw:layer="layout" svg:width="15.958cm" svg:height="0.956cm" svg:x="6.487cm" svg:y="11.329cm">
          <text:list text:style-name="L1">
            <text:list-header>
              <text:p text:style-name="P11"><text:span text:style-name="T15">db-CBS <text:s text:c="14"/>db-ECBS <text:s text:c="13"/>db-LaCAM (our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5" draw:layer="layout" svg:width="0.952cm" svg:height="0.724cm" svg:x="17.044cm" svg:y="10.358cm">
          <text:list text:style-name="L1">
            <text:list-header>
              <text:p text:style-name="P4"><text:span text:style-name="T8">x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066cm" svg:height="8.3cm" svg:x="7.32cm" svg:y="3.209cm">
          <draw:plugin xlink:href="Media/circle3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8" draw:layer="layout" svg:width="19.795cm" svg:height="11.134cm" svg:x="0.6cm" svg:y="2.258cm" draw:page-number="22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Experimental Results</text:span></text:p>
              </text:list-header>
            </text:list>
          </draw:text-box>
        </draw:frame>
        <draw:custom-shape draw:style-name="gr88" draw:text-style-name="P12" draw:layer="layout" svg:width="22.476cm" svg:height="0.957cm" svg:x="1.429cm" svg:y="2.377cm">
          <text:list text:style-name="L1">
            <text:list-header>
              <text:p text:style-name="P11"><text:span text:style-name="T15">Random start/goal/obstacles instance with N=8 spherical unicycle rob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2" draw:layer="layout" svg:width="17.414cm" svg:height="1.676cm" svg:x="2.064cm" svg:y="12.263cm">
          <text:list text:style-name="L1">
            <text:list-header>
              <text:p text:style-name="P11"><text:span text:style-name="T15">Runtime [s] <text:s text:c="9"/>9.2 <text:s text:c="21"/>12 <text:s text:c="25"/></text:span><text:span text:style-name="T21">1.7</text:span></text:p>
              <text:p text:style-name="P11"><text:span text:style-name="T15">Cost [s] <text:s text:c="12"/></text:span><text:span text:style-name="T21"><text:s/>135.8 </text:span><text:span text:style-name="T15"><text:s text:c="17"/>149.1</text:span><text:span text:style-name="T21"> </text:span><text:span text:style-name="T15"><text:s text:c="22"/>211.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2" draw:layer="layout" svg:width="15.958cm" svg:height="0.956cm" svg:x="6.487cm" svg:y="11.329cm">
          <text:list text:style-name="L1">
            <text:list-header>
              <text:p text:style-name="P11"><text:span text:style-name="T15">db-CBS <text:s text:c="14"/>db-ECBS <text:s text:c="13"/>db-LaCAM (our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5" draw:layer="layout" svg:width="0.952cm" svg:height="0.724cm" svg:x="17.044cm" svg:y="10.358cm">
          <text:list text:style-name="L1">
            <text:list-header>
              <text:p text:style-name="P4"><text:span text:style-name="T8">x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03cm" svg:height="8.273cm" svg:x="7.32cm" svg:y="3.256cm">
          <draw:plugin xlink:href="Media/random8sphere-6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8" draw:layer="layout" svg:width="19.795cm" svg:height="11.134cm" svg:x="0.6cm" svg:y="2.258cm" draw:page-number="23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Experimental Results</text:span></text:p>
              </text:list-header>
            </text:list>
          </draw:text-box>
        </draw:frame>
        <draw:custom-shape draw:style-name="gr92" draw:text-style-name="P12" draw:layer="layout" svg:width="19.583cm" svg:height="0.957cm" svg:x="1.429cm" svg:y="2.377cm">
          <text:list text:style-name="L1">
            <text:list-header>
              <text:p text:style-name="P11"><text:span text:style-name="T15">Random start/goal/obstacles instance with N=8 unicycle rob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2" draw:layer="layout" svg:width="17.528cm" svg:height="1.676cm" svg:x="2.064cm" svg:y="12.263cm">
          <text:list text:style-name="L1">
            <text:list-header>
              <text:p text:style-name="P11"><text:span text:style-name="T15">Runtime [s] <text:s text:c="9"/>6.7 <text:s text:c="21"/>6.9 <text:s text:c="25"/></text:span><text:span text:style-name="T21">1.2</text:span></text:p>
              <text:p text:style-name="P11"><text:span text:style-name="T15">Cost [s] <text:s text:c="12"/></text:span><text:span text:style-name="T21"><text:s/></text:span><text:span text:style-name="T15">118.9</text:span><text:span text:style-name="T21"> </text:span><text:span text:style-name="T15"><text:s text:c="17"/></text:span><text:span text:style-name="T21">117.2 </text:span><text:span text:style-name="T15"><text:s text:c="23"/>139.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2" draw:layer="layout" svg:width="15.958cm" svg:height="0.956cm" svg:x="6.487cm" svg:y="11.329cm">
          <text:list text:style-name="L1">
            <text:list-header>
              <text:p text:style-name="P11"><text:span text:style-name="T15">db-CBS <text:s text:c="14"/>db-ECBS <text:s text:c="13"/>db-LaCAM (our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5" draw:layer="layout" svg:width="0.952cm" svg:height="0.724cm" svg:x="17.044cm" svg:y="10.358cm">
          <text:list text:style-name="L1">
            <text:list-header>
              <text:p text:style-name="P4"><text:span text:style-name="T8">x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066cm" svg:height="8.299cm" svg:x="6.914cm" svg:y="3.175cm">
          <draw:plugin xlink:href="Media/random8-6x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8" draw:layer="layout" svg:width="19.795cm" svg:height="11.134cm" svg:x="0.6cm" svg:y="2.258cm" draw:page-number="24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Experimental Results</text:span></text:p>
              </text:list-header>
            </text:list>
          </draw:text-box>
        </draw:frame>
        <draw:custom-shape draw:style-name="gr96" draw:text-style-name="P12" draw:layer="layout" svg:width="12.867cm" svg:height="0.957cm" svg:x="1.429cm" svg:y="2.377cm">
          <text:list text:style-name="L1">
            <text:list-header>
              <text:p text:style-name="P11"><text:span text:style-name="T15">Maze instance with N=10 unicycle rob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2" draw:layer="layout" svg:width="17.864cm" svg:height="1.676cm" svg:x="2.064cm" svg:y="12.263cm">
          <text:list text:style-name="L1">
            <text:list-header>
              <text:p text:style-name="P11"><text:span text:style-name="T15">Runtime [s] <text:s text:c="8"/>32.8 <text:s text:c="21"/>9.6 <text:s text:c="25"/></text:span><text:span text:style-name="T21">2.9</text:span></text:p>
              <text:p text:style-name="P11"><text:span text:style-name="T15">Cost [s] <text:s text:c="12"/></text:span><text:span text:style-name="T21"><text:s/></text:span><text:span text:style-name="T15"><text:s/></text:span><text:span text:style-name="T21">210.1 <text:s/></text:span><text:span text:style-name="T15"><text:s text:c="16"/></text:span><text:span text:style-name="T21"><text:s text:c="2"/></text:span><text:span text:style-name="T15">208.7 <text:s text:c="21"/>231.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2" draw:layer="layout" svg:width="15.958cm" svg:height="0.956cm" svg:x="6.487cm" svg:y="11.329cm">
          <text:list text:style-name="L1">
            <text:list-header>
              <text:p text:style-name="P11"><text:span text:style-name="T15">db-CBS <text:s text:c="14"/>db-ECBS <text:s text:c="13"/>db-LaCAM (ours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0.404cm" svg:height="7.803cm" svg:x="7.285cm" svg:y="3.575cm">
          <draw:plugin xlink:href="Media/maze1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custom-shape draw:style-name="gr99" draw:text-style-name="P5" draw:layer="layout" svg:width="1.186cm" svg:height="0.724cm" svg:x="16.044cm" svg:y="9.959cm">
          <text:list text:style-name="L1">
            <text:list-header>
              <text:p text:style-name="P4"><text:span text:style-name="T8">x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9.795cm" svg:height="11.134cm" svg:x="0.6cm" svg:y="2.258cm" draw:page-number="25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Experimental Results</text:span></text:p>
              </text:list-header>
            </text:list>
          </draw:text-box>
        </draw:frame>
        <draw:custom-shape draw:style-name="gr100" draw:text-style-name="P12" draw:layer="layout" svg:width="16.893cm" svg:height="0.957cm" svg:x="1.429cm" svg:y="2.377cm">
          <text:list text:style-name="L1">
            <text:list-header>
              <text:p text:style-name="P11"><text:span text:style-name="T15">Forest instance with N=10 3D double integrator rob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2" draw:layer="layout" svg:width="18.159cm" svg:height="1.676cm" svg:x="2.064cm" svg:y="12.263cm">
          <text:list text:style-name="L1">
            <text:list-header>
              <text:p text:style-name="P11"><text:span text:style-name="T15">Runtime [s] <text:s text:c="7"/>31.4 <text:s text:c="21"/>40.8 <text:s text:c="25"/></text:span><text:span text:style-name="T21">13.9</text:span></text:p>
              <text:p text:style-name="P11"><text:span text:style-name="T15">Cost [s] <text:s text:c="12"/></text:span><text:span text:style-name="T21"><text:s/>93.7 <text:s/></text:span><text:span text:style-name="T15"><text:s text:c="16"/></text:span><text:span text:style-name="T21"><text:s text:c="2"/></text:span><text:span text:style-name="T15"><text:s text:c="2"/>96.6 <text:s text:c="25"/>132.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2" draw:layer="layout" svg:width="15.958cm" svg:height="0.956cm" svg:x="6.487cm" svg:y="11.329cm">
          <text:list text:style-name="L1">
            <text:list-header>
              <text:p text:style-name="P11"><text:span text:style-name="T15">db-CBS <text:s text:c="14"/>db-ECBS <text:s text:c="13"/>db-LaCAM (our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5" draw:layer="layout" svg:width="1.186cm" svg:height="0.724cm" svg:x="16.545cm" svg:y="10.261cm">
          <text:list text:style-name="L1">
            <text:list-header>
              <text:p text:style-name="P4"><text:span text:style-name="T8">x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9.795cm" svg:height="11.134cm" svg:x="0.6cm" svg:y="2.258cm" draw:page-number="26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2T11">
        <office:forms form:automatic-focus="false" form:apply-design-mode="false"/>
        <draw:frame presentation:style-name="pr4" draw:text-style-name="P3" draw:layer="layout" svg:width="22.86cm" svg:height="2.381cm" svg:x="1.27cm" svg:y="0.074cm" presentation:class="title" presentation:user-transformed="true">
          <draw:text-box>
            <text:list text:style-name="L1">
              <text:list-header>
                <text:p text:style-name="P10"><text:span text:style-name="T17">Experimental Results</text:span></text:p>
              </text:list-header>
            </text:list>
          </draw:text-box>
        </draw:frame>
        <draw:custom-shape draw:style-name="gr104" draw:text-style-name="P12" draw:layer="layout" svg:width="18.472cm" svg:height="0.957cm" svg:x="1.429cm" svg:y="2.377cm">
          <text:list text:style-name="L1">
            <text:list-header>
              <text:p text:style-name="P11"><text:span text:style-name="T15">Heterogeneous team of N=4 flying and N=4 unicycle rob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2" draw:layer="layout" svg:width="17.599cm" svg:height="1.676cm" svg:x="2.064cm" svg:y="12.263cm">
          <text:list text:style-name="L1">
            <text:list-header>
              <text:p text:style-name="P11"><text:span text:style-name="T15">Runtime [s] <text:s text:c="8"/>4.4 <text:s text:c="21"/>4.9 <text:s text:c="25"/></text:span><text:span text:style-name="T21"><text:s text:c="2"/>1.2</text:span></text:p>
              <text:p text:style-name="P11"><text:span text:style-name="T15">Cost [s] <text:s text:c="12"/></text:span><text:span text:style-name="T21"><text:s/></text:span><text:span text:style-name="T15">68.1</text:span><text:span text:style-name="T21"> <text:s/></text:span><text:span text:style-name="T15"><text:s text:c="16"/></text:span><text:span text:style-name="T21"><text:s text:c="2"/></text:span><text:span text:style-name="T15"><text:s/>69.3 <text:s text:c="25"/></text:span><text:span text:style-name="T21">36.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2" draw:layer="layout" svg:width="15.958cm" svg:height="0.956cm" svg:x="6.487cm" svg:y="11.329cm">
          <text:list text:style-name="L1">
            <text:list-header>
              <text:p text:style-name="P11"><text:span text:style-name="T15">db-CBS <text:s text:c="14"/>db-ECBS <text:s text:c="13"/>db-LaCAM (our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5" draw:layer="layout" svg:width="0.953cm" svg:height="0.724cm" svg:x="16.545cm" svg:y="10.261cm">
          <text:list text:style-name="L1">
            <text:list-header>
              <text:p text:style-name="P4"><text:span text:style-name="T8">x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9.795cm" svg:height="11.134cm" svg:x="0.6cm" svg:y="2.258cm" draw:page-number="27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Title1" presentation:presentation-page-layout-name="AL2T11">
        <office:forms form:automatic-focus="false" form:apply-design-mode="false"/>
        <draw:frame presentation:style-name="pr6" draw:layer="layout" svg:width="22.851cm" svg:height="2.373cm" svg:x="1.269cm" svg:y="0.572cm" presentation:class="title" presentation:placeholder="true">
          <draw:text-box/>
        </draw:frame>
        <draw:frame draw:style-name="gr108" draw:layer="layout" svg:width="22.851cm" svg:height="9.419cm" svg:x="1.269cm" svg:y="3.333cm" presentation:class="object" presentation:placeholder="true"/>
        <presentation:notes draw:style-name="dp3">
          <office:forms form:automatic-focus="false" form:apply-design-mode="false"/>
          <draw:page-thumbnail draw:style-name="gr8" draw:layer="layout" svg:width="19.791cm" svg:height="11.126cm" svg:x="0.599cm" svg:y="2.258cm" draw:page-number="28" presentation:class="page"/>
          <draw:frame presentation:style-name="pr7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2T11">
        <office:forms form:automatic-focus="false" form:apply-design-mode="false"/>
        <draw:frame presentation:style-name="pr8" draw:text-style-name="P3" draw:layer="layout" svg:width="22.856cm" svg:height="2.376cm" svg:x="1.27cm" svg:y="0.071cm" presentation:class="title" presentation:user-transformed="true">
          <draw:text-box>
            <text:list text:style-name="L1">
              <text:list-header>
                <text:p text:style-name="P10"><text:span text:style-name="T17">Summary</text:span></text:p>
              </text:list-header>
            </text:list>
          </draw:text-box>
        </draw:frame>
        <draw:custom-shape draw:style-name="gr109" draw:text-style-name="P12" draw:layer="layout" svg:width="12.806cm" svg:height="0.956cm" svg:x="1.53cm" svg:y="2.611cm">
          <text:list text:style-name="L1">
            <text:list-header>
              <text:p text:style-name="P11"><text:span text:style-name="T15">We introduce db-LaCAM, a planner that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6" draw:layer="layout" svg:width="15.883cm" svg:height="5.177cm" svg:x="4.344cm" svg:y="2.681cm">
          <text:list text:style-name="L1">
            <text:list-header>
              <text:p text:style-name="P15"><text:span text:style-name="T2"/></text:p>
            </text:list-header>
          </text:list>
          <text:list text:style-name="L2">
            <text:list-item>
              <text:p text:style-name="P18"><text:span text:style-name="T2">Is </text:span><text:span text:style-name="T19">resolution-complete</text:span><text:span text:style-name="T2"> w.r.t motion primitives;</text:span></text:p>
            </text:list-item>
            <text:list-item>
              <text:p text:style-name="P18"><text:span text:style-name="T2">Works with </text:span><text:span text:style-name="T19">arbitrary robot dynamics</text:span><text:span text:style-name="T2">;</text:span></text:p>
            </text:list-item>
            <text:list-item>
              <text:p text:style-name="P18"><text:span text:style-name="T2">Up to </text:span><text:span text:style-name="T19">x10 faster</text:span><text:span text:style-name="T2"> runtime compared to SOTA planners.</text:span></text:p>
            </text:list-item>
          </text:list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5" xml:id="id13" draw:id="id13" draw:layer="layout" svg:width="3.885cm" svg:height="0.957cm" svg:x="1.689cm" svg:y="8.859cm">
          <text:list text:style-name="L1">
            <text:list-header>
              <text:p text:style-name="P4"><text:span text:style-name="T2">Limitations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5" xml:id="id14" draw:id="id14" draw:layer="layout" svg:width="10.468cm" svg:height="0.957cm" svg:x="3.709cm" svg:y="10.129cm">
          <text:list text:style-name="L3">
            <text:list-item>
              <text:p text:style-name="P4"><text:span text:style-name="T2">Heuristic estimation is expensive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9.795cm" svg:height="11.13cm" svg:x="0.6cm" svg:y="2.258cm" draw:page-number="29" presentation:class="page"/>
          <draw:frame presentation:style-name="pr3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7cm" fo:margin-bottom="0.009cm" fo:line-height="83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406cm" fo:margin-bottom="0.009cm" fo:line-height="83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309cm" fo:margin-bottom="0.009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Noto Sans CJK SC1" style:font-family-asian="'Noto Sans CJK SC'" style:font-pitch-asian="variable" style:font-size-asian="15pt" style:font-style-asian="normal" style:font-weight-asian="normal" style:font-name-complex="Noto Sans CJK SC1" style:font-family-complex="'Noto Sans CJK SC'" style:font-pitch-complex="variable" style:font-size-complex="1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7cm" fo:margin-bottom="0.009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Noto Sans CJK SC1" style:font-family-asian="'Noto Sans CJK SC'" style:font-pitch-asian="variable" style:font-size-asian="15pt" style:font-style-asian="normal" style:font-weight-asian="normal" style:font-name-complex="Noto Sans CJK SC1" style:font-family-complex="'Noto Sans CJK SC'" style:font-pitch-complex="variable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6cm" fo:margin-bottom="0.009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9cm" fo:margin-bottom="0.009cm" fo:line-height="93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27cm" fo:padding-bottom="0.127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7cm" fo:margin-bottom="0.009cm" fo:line-height="83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.406cm" fo:margin-bottom="0.009cm" fo:line-height="83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09cm" fo:margin-bottom="0.009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Noto Sans CJK SC1" style:font-family-asian="'Noto Sans CJK SC'" style:font-pitch-asian="variable" style:font-size-asian="15pt" style:font-style-asian="normal" style:font-weight-asian="normal" style:font-name-complex="Noto Sans CJK SC1" style:font-family-complex="'Noto Sans CJK SC'" style:font-pitch-complex="variable" style:font-size-complex="15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7cm" fo:margin-bottom="0.009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Noto Sans CJK SC1" style:font-family-asian="'Noto Sans CJK SC'" style:font-pitch-asian="variable" style:font-size-asian="15pt" style:font-style-asian="normal" style:font-weight-asian="normal" style:font-name-complex="Noto Sans CJK SC1" style:font-family-complex="'Noto Sans CJK SC'" style:font-pitch-complex="variable" style:font-size-complex="15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6cm" fo:margin-bottom="0.009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9cm" fo:margin-bottom="0.009cm" fo:line-height="93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7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7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09cm" fo:margin-bottom="0.009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7" style:family="paragraph">
      <style:paragraph-properties fo:margin-left="0cm" fo:margin-right="0cm" fo:margin-top="0.009cm" fo:margin-bottom="0.009cm" fo:line-height="100%" fo:text-align="center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09cm" fo:margin-bottom="0.009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9" style:family="paragraph">
      <style:paragraph-properties fo:margin-left="0cm" fo:margin-right="0cm" fo:margin-top="0.009cm" fo:margin-bottom="0.009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9cm" fo:margin-bottom="0.009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.009cm" fo:margin-bottom="0.009cm" fo:line-height="93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margin-top="0.009cm" fo:margin-bottom="0.00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5" style:family="paragraph">
      <style:paragraph-properties fo:margin-left="0cm" fo:margin-right="0cm" fo:margin-top="0.009cm" fo:margin-bottom="0.009cm" fo:line-height="93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margin-top="0.009cm" fo:margin-bottom="0.009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loext:opacity="100%" style:text-position="0% 100%" style:font-name="Calibri" fo:font-size="9pt" fo:language="en" fo:country="US" style:font-name-asian="DejaVu Sans1" style:font-size-asian="9pt" style:language-asian="en" style:country-asian="US" style:font-name-complex="DejaVu Sans1" style:font-size-complex="9pt" style:language-complex="en" style:country-complex="US"/>
    </style:style>
    <style:style style:name="MT3" style:family="text">
      <style:text-properties fo:color="#000000" loext:opacity="100%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b8b8b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1cm" svg:height="3.052cm" svg:x="1.904cm" svg:y="4.436cm" presentation:class="title" presentation:placeholder="true">
        <draw:text-box/>
      </draw:frame>
      <draw:frame draw:style-name="Mgr3" draw:text-style-name="MP6" draw:layer="backgroundobjects" svg:width="5.918cm" svg:height="0.75cm" svg:x="1.27cm" svg:y="13.242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35cm" svg:height="0.75cm" svg:x="8.677cm" svg:y="13.242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5" draw:text-style-name="MP10" draw:layer="backgroundobjects" svg:width="5.918cm" svg:height="0.75cm" svg:x="18.203cm" svg:y="13.242cm" presentation:class="page-number">
        <draw:text-box>
          <text:list text:style-name="ML2">
            <text:list-header>
              <text:p text:style-name="MP9"><text:span text:style-name="MT2"><text:page-number>28</text:page-number></text:span></text:p>
            </text:list-header>
          </text:list>
        </draw:text-box>
      </draw:frame>
      <draw:frame presentation:style-name="Default-outline1" draw:layer="backgroundobjects" svg:width="22.851cm" svg:height="8.277cm" svg:x="1.269cm" svg:y="3.342cm" presentation:class="outline" presentation:placeholder="true">
        <draw:text-box/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9.791cm" svg:height="11.126cm" svg:x="0.599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8" draw:text-style-name="MP14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13"><text:span text:style-name="MT3"><presentation:header/></text:span></text:p>
              </text:list-header>
            </text:list>
          </draw:text-box>
        </draw:frame>
        <draw:frame draw:style-name="Mgr9" draw:text-style-name="MP16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5"><text:span text:style-name="MT3"><presentation:date-time/></text:span></text:p>
              </text:list-header>
            </text:list>
          </draw:text-box>
        </draw:frame>
        <draw:frame draw:style-name="Mgr10" draw:text-style-name="MP14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13"><text:span text:style-name="MT3"><presentation:footer/></text:span></text:p>
              </text:list-header>
            </text:list>
          </draw:text-box>
        </draw:frame>
        <draw:frame draw:style-name="Mgr11" draw:text-style-name="MP16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5"><text:span text:style-name="MT3"><text:page-number>28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2.851cm" svg:height="2.373cm" svg:x="1.269cm" svg:y="0.572cm" presentation:class="title" presentation:placeholder="true">
        <draw:text-box/>
      </draw:frame>
      <draw:frame presentation:style-name="Title1-outline1" draw:layer="backgroundobjects" svg:width="22.851cm" svg:height="9.419cm" svg:x="1.269cm" svg:y="3.333cm" presentation:class="outline" presentation:placeholder="true">
        <draw:text-box/>
      </draw:frame>
      <draw:frame draw:style-name="Mgr12" draw:text-style-name="MP6" draw:layer="backgroundobjects" svg:width="5.918cm" svg:height="0.75cm" svg:x="1.27cm" svg:y="13.242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3" draw:text-style-name="MP8" draw:layer="backgroundobjects" svg:width="8.035cm" svg:height="0.75cm" svg:x="8.677cm" svg:y="13.242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14" draw:text-style-name="MP10" draw:layer="backgroundobjects" svg:width="5.918cm" svg:height="0.75cm" svg:x="18.203cm" svg:y="13.242cm" presentation:class="page-number">
        <draw:text-box>
          <text:list text:style-name="ML2">
            <text:list-header>
              <text:p text:style-name="MP9"><text:span text:style-name="MT2"><text:page-number>28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9.791cm" svg:height="11.126cm" svg:x="0.599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14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13"><text:span text:style-name="MT3"><presentation:header/></text:span></text:p>
              </text:list-header>
            </text:list>
          </draw:text-box>
        </draw:frame>
        <draw:frame presentation:style-name="Mpr2" draw:text-style-name="MP16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5"><text:span text:style-name="MT3"><presentation:date-time/></text:span></text:p>
              </text:list-header>
            </text:list>
          </draw:text-box>
        </draw:frame>
        <draw:frame presentation:style-name="Mpr3" draw:text-style-name="MP14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13"><text:span text:style-name="MT3"><presentation:footer/></text:span></text:p>
              </text:list-header>
            </text:list>
          </draw:text-box>
        </draw:frame>
        <draw:frame presentation:style-name="Mpr4" draw:text-style-name="MP16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5"><text:span text:style-name="MT3"><text:page-number>28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b-LaCAM: Fast and Scalable Multi-Robot Kinodynamic Motion Planning with Discontinuity-Bounded Search and Lightweight MAPF</dc:title>
    <meta:initial-creator>Akmaral Moldagalieva, Keisuke Okumura, Amanda Prorok, Wolfgang Hönig</meta:initial-creator>
    <meta:creation-date>2026-01-15T08:51:35</meta:creation-date>
    <dc:date>2026-01-15T17:16:11.312780337</dc:date>
    <meta:editing-cycles>72</meta:editing-cycles>
    <meta:editing-duration>PT4H19M12S</meta:editing-duration>
    <meta:generator>LibreOffice/7.3.7.2$Linux_X86_64 LibreOffice_project/30$Build-2</meta:generator>
    <meta:document-statistic meta:object-count="263"/>
    <meta:user-defined meta:name="bibliography">references.bib</meta:user-defined>
    <meta:user-defined meta:name="controls">False</meta:user-defined>
    <meta:user-defined meta:name="date">January 27, 2026</meta:user-defined>
    <meta:user-defined meta:name="maxScale">10</meta:user-defined>
    <meta:user-defined meta:name="minScale" meta:value-type="string">0.2</meta:user-defined>
    <meta:user-defined meta:name="navigationMode" meta:value-type="string">linear</meta:user-defined>
    <meta:user-defined meta:name="slideNumber" meta:value-type="string">True</meta:user-defined>
    <meta:user-defined meta:name="subtitle" meta:value-type="string">Association for the Advancement of Artificial Intelligence (AAAI) 2026</meta:user-defined>
    <meta:user-defined meta:name="theme" meta:value-type="string">white</meta:user-defined>
  </office:meta>
</office:document-meta>
</file>

<file path=Object 1/content.xml><?xml version="1.0" encoding="utf-8"?>
<math xmlns="http://www.w3.org/1998/Math/MathML" display="block">
  <semantics>
    <mrow>
      <mstyle mathsize="12pt">
        <mi>δ</mi>
      </mstyle>
      <mrow/>
    </mrow>
    <annotation encoding="StarMath 5.0"> size 12{δ} {}</annotation>
  </semantics>
</math>
</file>

<file path=Object 2/content.xml><?xml version="1.0" encoding="utf-8"?>
<math xmlns="http://www.w3.org/1998/Math/MathML" display="block">
  <semantics>
    <mrow>
      <mstyle mathsize="12pt">
        <mo stretchy="false">→</mo>
      </mstyle>
      <mrow/>
    </mrow>
    <annotation encoding="StarMath 5.0"> size 12{ rightarrow } {}</annotation>
  </semantics>
</math>
</file>